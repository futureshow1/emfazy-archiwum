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2" style:family="paragraph" style:parent-style-name="Text_20_body">
      <style:paragraph-properties fo:margin-top="0.423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423cm" fo:margin-bottom="0cm" style:contextual-spacing="false" fo:line-height="138%" fo:text-align="justify" style:justify-single-word="fals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089319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53b5d78-7fff-b4c2-b271-692ba9d2414f"/><text:span text:style-name="T1">Emfazy</text:span><text:span text:style-name="T5"> </text:span><text:span text:style-name="T2">- film dokumentalny o Lechu Emfazym Stefańskim</text:span></text:p>
      <text:p text:style-name="P2">reż. Jan Przyłuski</text:p>
      <text:p text:style-name="P2">czas: 25-27 min</text:p>
      <text:p text:style-name="Text_20_body"/>
      <text:p text:style-name="P3"><text:span text:style-name="T2">Moim celem jest nakręcić film dokumentalny poświęcony twórczości Lecha Emfazego Stefańskiego. Ten wyjątkowy artysta nie doczekał się należytego upamiętnienia. Znany jest jako twórca polskiej psychotroniki, ale był przede wszystkim artystą. Z wykształcenia malarz i reżyser, następnie w swoim mieszkaniu na warszawskiej Ochocie stworzył z Mironem Białoszewskim i Bogusławem Choińskim słynny Teatr na Tarczyńskiej. Tam od czerwca 1955 roku, grając zarówno w swoich sztukach teatralnych jak Mirona i Choińskiego, wykreował miejsce, które długo promieniowało doniosłością artystycznych dokonań. Nie bez przesady można powiedzieć, że uczył Białoszewskiego reżyserii, sam mając w tym zakresie wykształcenie i doświadczenie. Jego </text:span><text:span text:style-name="T4">Homunculus</text:span><text:span text:style-name="T5"> </text:span><text:span text:style-name="T2">i </text:span><text:span text:style-name="T4">Wiwisekcja</text:span><text:span text:style-name="T5"> </text:span><text:span text:style-name="T2">Białoszewskiego inaugurują TnT. W </text:span><text:span text:style-name="T4">Lepach</text:span><text:span text:style-name="T5"> – </text:span><text:span text:style-name="T4">Szarej mszy</text:span><text:span text:style-name="T5"> </text:span><text:span text:style-name="T2">i </text:span><text:span text:style-name="T4">Wyprawach krzyżowych</text:span><text:span text:style-name="T5"> </text:span><text:span text:style-name="T2">Białoszewskiego współpracował reżysersko grając jednocześnie kilka postaci. W swojej sztuce </text:span><text:span text:style-name="T4">Narodziny Afrodyty. Szminka. Śledzie, śledzie!</text:span><text:span text:style-name="T5"> </text:span><text:span text:style-name="T2">z muzyką Stanisława Prószyńskiego, Stefański skromnie przypisał reżyserię całemu zespołowi. Projektował scenografie, pisał teksty, wcielał się w role. Jego dwie młodzieńcze powieści – „Alchemicy” i „Biały pył” – wzbudziły wielkie zainteresowanie, a druga stała się podstawą pierwszego polskiego serialu telewizyjnego.</text:span></text:p>
      <text:p text:style-name="P2">Zawsze zajmowała go twórczość i budzenie pełnego potencjału w ludziach. Nawet psychotronikę (założył przy Polskim Towarzystwie Cybernetycznym sekcję Psychotroniki, potem Polskie Towarzystwo Psychotroniczne i potem poświęcił jej resztę życia) traktował jako sztukę doskonalenia umysłu i odkrywania ukrytych możliwości twórczych. „Wiele razy wspominał, że najlepszym hipnotyzerem w Polsce był Gustaw Holoubek…". Współpracował z najwybitniejszymi, jak na przykład z geniuszem polskiej muzyki elektronicznej, wtedy prawie zupełnie nieznanym, Eugeniuszem Rudnikiem przygotowując specjalne nagrania w Studio Eksperymentalnym Polskiego Radia.</text:p>
      <text:p text:style-name="P3"><text:span text:style-name="T2">Scenariusz filmu o Emfazym ma mi posłużyć do pracy z zespołem (już zdeklarowanym i zaangażowanym). Ten zespół to: dr Zbigniew Łagosz - religioznawca UJ, przeprowadzi poszukiwania i zgromadzi bezcenne materiały o Stefańskim do scenariusza i montażu. Olga Drenda - pisarka, badać będzie (oczywiście) duchologię psychotroniki czasów PRL, Dariusz Misiuna – socjolog, prowadzi wydawnictwo Okultura, zgodził się być naszym ekspertem w dziedzinie magii i okultyzmu, Łukasz Orbitowski - pisarz, wesprze literacko i koncepcyjnie projekt, Tomasz Stawiszyński – filozof, to dobry duch filmu i jego konsultant </text:span><text:soft-page-break/><text:span text:style-name="T2">filozoficzny. Koncepcja filmu zakłada wielorakość użytych w nim form filmowych. Bogaty i fascynujący materiał archiwalny: filmy i fotografie (m.in. z kolekcji Ireny Jarosińskiej) z Teatru na Tarczyńskiej, wideo i audio z sesji badań parapsychologicznych, fragmenty filmów autorstwa Emfazego i z jego udziałem (pamiętne role hipnotyzera z tv w serialu </text:span><text:span text:style-name="T4">Siedem życzeń</text:span><text:span text:style-name="T5"> </text:span><text:span text:style-name="T2">czy docenta w </text:span><text:span text:style-name="T4">Barwach Ochronnych</text:span><text:span text:style-name="T5"> </text:span><text:span text:style-name="T2">Zanussiego), a także kroniki filmowe (niezwykłe materiały z praskiej Wytwórni o jednym z bohaterów książki Stefańskiego), programy telewizyjne z czasów początków polskiej psychologii eksperymentalnej i parapsychologii, to wszystko połączone zostanie oczywiście z rozmowami z przyjaciółmi Lecha Emfazego Stefańskiego, świadkami działań artystycznych i naukowych, z współpracownikami, tak z teatralnej drogi twórczej, jak z czasów badań paranormalnych i psychodelicznych. Aby formę „gadających głów” formalnie osadzić w całości filmu i nie zdominować nią przebiegu, chciałbym na postawie materiałów archiwalnych stworzyć/”od-tworzyć” inspirowaną estetyką Teatr na Tarczyńskiej animację. Jeśli tylko uda się znaleźć odpowiedniego animatora, animacja ta zmontowana będzie w naszym dokumencie w formie mini-sesji „teatralnych” i będzie formalną transpozycją „teatru rąk i przedmiotów” charakterystyczną dla trójki Białoszewski-Stefański-Choiński, na medium filmowe. Będą to animacyjne sesje: wywoływania ducha Emfazego, seansu hipnotycznego, Dziadów, wieczoru awangardy artystycznej itd. Jako ścieżkę muzyczną operę pełnospektaklową z 12 ariami Stanisław Prószyńskiego, a także fragmenty ulubionych utworów Emfazego (jak wspomina jego “wychowanek” Jan Gondowicz): </text:span><text:span text:style-name="T4">Pacific 231</text:span><text:span text:style-name="T5"> </text:span><text:span text:style-name="T2">Honeggera, </text:span><text:span text:style-name="T4">Ebony Concerto</text:span><text:span text:style-name="T5"> </text:span><text:span text:style-name="T2">Strawińskiego, opera jazzowa </text:span><text:span text:style-name="T4">Jonny spielt auf?</text:span><text:span text:style-name="T5"> </text:span><text:span text:style-name="T2">Ernsta Kreneka, Sonata na fortepian ćwierćtonowy Aloisa Haba i inne. </text:span><text:span text:style-name="T3">Najistotniejsza jednak pozostaje warstwa faktograficzna i sama twórczość Lech Emfazego. </text:span>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4T14:04:41.367000000</meta:creation-date>
    <dc:date>2022-08-04T14:05:57.310000000</dc:date>
    <meta:editing-duration>PT1M16S</meta:editing-duration>
    <meta:editing-cycles>1</meta:editing-cycles>
    <meta:document-statistic meta:table-count="0" meta:image-count="0" meta:object-count="0" meta:page-count="2" meta:paragraph-count="7" meta:word-count="570" meta:character-count="4500" meta:non-whitespace-character-count="3929"/>
    <meta:generator>LibreOffice/7.1.4.2$Windows_X86_64 LibreOffice_project/a529a4fab45b75fefc5b6226684193eb000654f6</meta:generator>
  </office:meta>
</office:document-meta>
</file>